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docs-Roboto" svg:font-family="docs-Roboto, Helvetica, Arial, sans-serif"/>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5in" fo:margin-left="-0.075in" fo:margin-top="0in" fo:margin-bottom="0in" table:align="left"/>
    </style:style>
    <style:style style:name="Table1.A" style:family="table-column">
      <style:table-column-properties style:column-width="2.0826in"/>
    </style:style>
    <style:style style:name="Table1.B" style:family="table-column">
      <style:table-column-properties style:column-width="1.3889in"/>
    </style:style>
    <style:style style:name="Table1.C" style:family="table-column">
      <style:table-column-properties style:column-width="1.3882in"/>
    </style:style>
    <style:style style:name="Table1.D" style:family="table-column">
      <style:table-column-properties style:column-width="1.6396in"/>
    </style:style>
    <style:style style:name="Table1.1" style:family="table-row">
      <style:table-row-properties style:keep-together="true" fo:keep-together="auto"/>
    </style:style>
    <style:style style:name="Table1.A1" style:family="table-cell">
      <style:table-cell-properties fo:background-color="#2e75b6" fo:padding-left="0.075in" fo:padding-right="0.075in" fo:padding-top="0in" fo:padding-bottom="0in" fo:border="0.0014in solid #cccccc">
        <style:background-image/>
      </style:table-cell-properties>
    </style:style>
    <style:style style:name="Table1.A2" style:family="table-cell">
      <style:table-cell-properties fo:padding-left="0.075in" fo:padding-right="0.075in" fo:padding-top="0in" fo:padding-bottom="0in" fo:border="0.0014in solid #cccccc"/>
    </style:style>
    <style:style style:name="Table2" style:family="table">
      <style:table-properties style:width="6.5in" fo:margin-left="-0.075in" fo:margin-top="0in" fo:margin-bottom="0in" table:align="left"/>
    </style:style>
    <style:style style:name="Table2.A" style:family="table-column">
      <style:table-column-properties style:column-width="1.3882in"/>
    </style:style>
    <style:style style:name="Table2.D" style:family="table-column">
      <style:table-column-properties style:column-width="1.1667in"/>
    </style:style>
    <style:style style:name="Table2.E" style:family="table-column">
      <style:table-column-properties style:column-width="1.1688in"/>
    </style:style>
    <style:style style:name="Table2.1" style:family="table-row">
      <style:table-row-properties style:keep-together="true" fo:keep-together="auto"/>
    </style:style>
    <style:style style:name="Table2.A1" style:family="table-cell">
      <style:table-cell-properties fo:background-color="#2e75b6" fo:padding-left="0.075in" fo:padding-right="0.075in" fo:padding-top="0in" fo:padding-bottom="0in" fo:border="0.0014in solid #cccccc">
        <style:background-image/>
      </style:table-cell-properties>
    </style:style>
    <style:style style:name="Table2.A2" style:family="table-cell">
      <style:table-cell-properties fo:padding-left="0.075in" fo:padding-right="0.075in" fo:padding-top="0in" fo:padding-bottom="0in" fo:border="0.0014in solid #cccccc"/>
    </style:style>
    <style:style style:name="P1" style:family="paragraph" style:parent-style-name="Standard">
      <style:paragraph-properties fo:margin-top="2in" fo:margin-bottom="0in" fo:text-align="center" style:justify-single-word="false"/>
    </style:style>
    <style:style style:name="P2" style:family="paragraph" style:parent-style-name="Standard" style:master-page-name="Standard">
      <style:paragraph-properties fo:margin-top="2in" fo:margin-bottom="0in" fo:text-align="center" style:justify-single-word="false" style:page-number="auto"/>
    </style:style>
    <style:style style:name="P3" style:family="paragraph" style:parent-style-name="Standard">
      <style:paragraph-properties fo:margin-top="0.1665in" fo:margin-bottom="0in" fo:text-align="center" style:justify-single-word="false"/>
    </style:style>
    <style:style style:name="P4" style:family="paragraph" style:parent-style-name="Standard">
      <style:paragraph-properties fo:margin-top="0.0835in" fo:margin-bottom="0in" fo:text-align="center" style:justify-single-word="false"/>
    </style:style>
    <style:style style:name="P5" style:family="paragraph" style:parent-style-name="Standard">
      <style:paragraph-properties fo:margin-top="1in" fo:margin-bottom="0in" fo:text-align="center" style:justify-single-word="false"/>
    </style:style>
    <style:style style:name="P6" style:family="paragraph" style:parent-style-name="Standard">
      <style:paragraph-properties fo:margin-top="0in" fo:margin-bottom="0.139in"/>
    </style:style>
    <style:style style:name="P7" style:family="paragraph" style:parent-style-name="Standard">
      <style:paragraph-properties fo:margin-top="0in" fo:margin-bottom="0.0835in"/>
    </style:style>
    <style:style style:name="P8" style:family="paragraph" style:parent-style-name="Standard">
      <style:paragraph-properties fo:margin-top="0.139in" fo:margin-bottom="0.139in"/>
    </style:style>
    <style:style style:name="P9" style:family="paragraph" style:parent-style-name="Standard">
      <style:paragraph-properties fo:margin-top="0.3335in" fo:margin-bottom="0in" fo:text-align="center" style:justify-single-word="false"/>
    </style:style>
    <style:style style:name="P10" style:family="paragraph" style:parent-style-name="Heading_20_1">
      <style:paragraph-properties fo:break-before="page"/>
    </style:style>
    <style:style style:name="P11" style:family="paragraph" style:parent-style-name="Heading_20_2">
      <style:paragraph-properties fo:keep-with-next="always"/>
    </style:style>
    <style:style style:name="T1" style:family="text">
      <style:text-properties fo:color="#2e75b6" fo:font-size="22pt" fo:font-weight="bold" style:font-size-asian="22pt" style:font-weight-asian="bold" style:font-size-complex="22pt" style:font-weight-complex="bold"/>
    </style:style>
    <style:style style:name="T2" style:family="text">
      <style:text-properties fo:font-weight="bold" style:font-weight-asian="bold"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3pt" fo:font-style="italic" style:font-size-asian="13pt" style:font-style-asian="italic" style:font-size-complex="13pt" style:font-style-complex="italic"/>
    </style:style>
    <style:style style:name="T8" style:family="text">
      <style:text-properties fo:color="#ffffff" fo:font-weight="bold" style:font-weight-asian="bold" style:font-weight-complex="bold"/>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variant="normal" fo:text-transform="none" fo:color="#1f1f1f" style:font-name="docs-Roboto" fo:font-size="24pt" fo:letter-spacing="normal" fo:font-style="normal" fo:font-weight="normal"/>
    </style:style>
    <style:style style:name="T11" style:family="text">
      <style:text-properties fo:font-variant="normal" fo:text-transform="none" fo:color="#1f1f1f" style:font-name="Roboto" fo:font-size="10.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BIRLA VISHVAKARMA MAHAVIDYALAYA</text:span></text:p>
      <text:p text:style-name="P3"><text:span text:style-name="T3">Engineering College</text:span></text:p>
      <text:p text:style-name="P4"><text:span text:style-name="T4">Vallabh Vidyanagar, Anand, Gujarat</text:span></text:p>
      <text:p text:style-name="P5"><text:span text:style-name="T5">A Comprehensive Overview</text:span></text:p>
      <text:p text:style-name="P1"><text:span text:style-name="T6">Established 1948</text:span></text:p>
      <text:p text:style-name="P3"><text:span text:style-name="T7">"Work is Worship"</text:span></text:p>
      <text:p text:style-name="Standard"/>
      <text:h text:style-name="P10" text:outline-level="1">Executive Summary</text:h>
      <text:p text:style-name="P6">Birla Vishvakarma Mahavidyalaya (BVM) Engineering College stands as a testament to engineering education excellence in India, having served as Gujarat's first engineering college since its establishment in 1948. Located in the educational hub of Vallabh Vidyanagar in Anand district, BVM has been at the forefront of producing globally competent engineers and technology leaders for over 75 years.</text:p>
      <text:p text:style-name="P6">Founded with the vision of Bharat Ratna Sardar Vallabhbhai Patel and generously supported by Shri Ghanshyamdasji Birla through the Birla Education Trust, the institution was inaugurated by Lord Mountbatten, the Governor-General of India, on June 14, 1948. This historic college is managed by Charutar Vidya Mandal (CVM) and has evolved from a pioneering institution into a modern autonomous engineering college affiliated with Gujarat Technological University (GTU).</text:p>
      <text:p text:style-name="P6">With an 18.96-acre green campus, BVM currently offers 9 undergraduate B.Tech programs, 7 postgraduate M.Tech programs, and doctoral (Ph.D.) programs across various engineering disciplines. The institution has graduated over 20,000 engineers who have made significant contributions across the globe. The college maintains high academic standards with NBA and NAAC accreditations, reflecting its commitment to quality education and continuous improvement.</text:p>
      <text:p text:style-name="P6">BVM's placement record speaks volumes about its educational quality, with over 95% placement rates and packages ranging from INR 3.5 LPA to 18 LPA. The institution has produced notable alumni including A.M. Naik (Group Chairman, Larsen &amp; Toubro, Padma Vibhushan awardee), demonstrating the caliber of professionals it nurtures. The college continues to strengthen industry-academia partnerships, promote research and innovation, and align itself with the National Education Policy (NEP) 2020 to prepare students for the challenges of the 21st century.</text:p>
      <text:p text:style-name="Standard"/>
      <text:h text:style-name="P10" text:outline-level="1">Historical Background and Foundation</text:h>
      <text:h text:style-name="Heading_20_2" text:outline-level="2">The Genesis</text:h>
      <text:p text:style-name="P6">The establishment of Birla Vishvakarma Mahavidyalaya in 1948 marks a significant milestone in the history of technical education in Gujarat and India. The college owes its existence to the visionary leadership of Sardar Vallabhbhai Patel, India's first Home Minister and the 'Iron Man of India,' who recognized the critical need for technical education in newly independent India.</text:p>
      <text:p text:style-name="P6">Sardar Patel's vision was brought to fruition through the generous support of the industrialist and philanthropist Shri Ghanshyamdasji Birla, who donated substantial funds through the Birla Education Trust. This partnership between visionary leadership and philanthropic support laid the foundation for what would become Gujarat's premier engineering institution.</text:p>
      <text:h text:style-name="Heading_20_2" text:outline-level="2">The Inauguration</text:h>
      <text:p text:style-name="P6">On June 14, 1948, Lord Mountbatten, the last Viceroy and first Governor-General of independent India, inaugurated Birla Vishvakarma Mahavidyalaya. This historic event took place just months after India gained independence, symbolizing the nation's commitment to building technological capabilities and human resources. The presence of Lord Mountbatten at the inauguration underscored the national importance attached to this institution.</text:p>
      <text:h text:style-name="Heading_20_2" text:outline-level="2">Early Years and Growth</text:h>
      <text:p text:style-name="P6">The college rose to prominence under the stewardship of distinguished academicians like Prof. Junnarkar and Prof. K.M. Dholakia, who established the academic rigor and administrative framework that continues to guide the institution. BVM became known as a pioneer in progressive education methodologies, being one of the first colleges in India to adopt the credit system of relative grading.</text:p>
      <text:p text:style-name="P6">In 1958, the college attained grant-in-aid status, which provided financial stability and enabled expansion of academic programs and infrastructure. This grant-in-aid model, combining government support with private management under Charutar Vidya Mandal, has proven to be an effective governance structure that balances autonomy with accountability.</text:p>
      <text:h text:style-name="Heading_20_2" text:outline-level="2">Evolution to Autonomy</text:h>
      <text:p text:style-name="P6">A major milestone in BVM's journey came in August 2015 when the college was granted autonomous status by the University Grants Commission (UGC). BVM became the first autonomous engineering institute in Gujarat, a recognition of its academic excellence, quality of faculty, infrastructure, and track record of producing competent engineers. This autonomous status provided the college with greater flexibility in curriculum design, <text:soft-page-break/>examination patterns, and academic innovations while maintaining affiliation with Gujarat Technological University.</text:p>
      <text:h text:style-name="Heading_20_2" text:outline-level="2">Legacy Faculty and Publications</text:h>
      <text:p text:style-name="P6">BVM's faculty has made significant contributions to engineering education in India. Notable among them is N.D. Bhatt, author of the widely used textbooks on Engineering Drawing that have educated generations of engineering students across India. Similarly, Dr. N.C. Pandya and Dr. C.S. Shah authored multiple influential books on Mechanical Engineering that remain reference texts in engineering colleges nationwide.</text:p>
      <text:h text:style-name="Heading_20_2" text:outline-level="2">The Institutional Motto</text:h>
      <text:p text:style-name="P6">The institutional motto "Work is Worship" reflects the foundational philosophy that has guided BVM since its inception. This principle, inspired by Sardar Patel's vision and reinforced by the Birla family's values, emphasizes dedication, excellence, and the dignity of labor. It continues to inspire students and faculty to approach their work with commitment and integrity.</text:p>
      <text:p text:style-name="Standard"/>
      <text:h text:style-name="P10" text:outline-level="1">Vision, Mission, and Core Values</text:h>
      <text:h text:style-name="Heading_20_2" text:outline-level="2">Vision</text:h>
      <text:p text:style-name="P6">BVM envisions becoming a globally recognized center of excellence in engineering education, research, and innovation. The institution aims to develop technically proficient and socially responsible professionals who can contribute meaningfully to industry and society. The vision emphasizes nurturing a vibrant academic environment that encourages research, entrepreneurship, and lifelong learning.</text:p>
      <text:h text:style-name="Heading_20_2" text:outline-level="2">Mission</text:h>
      <text:p text:style-name="P6">The mission of BVM Engineering College encompasses several key objectives:</text:p>
      <text:p text:style-name="P7">• Re-engineer curricula to meet global employment requirements and align with industry needs</text:p>
      <text:p text:style-name="P7">• Promote innovative practices at all levels of teaching, learning, and research</text:p>
      <text:p text:style-name="P7">• Imbibe core values of integrity, excellence, and social responsibility in students</text:p>
      <text:p text:style-name="P7">• Reform policies, systems, and processes to enhance institutional effectiveness</text:p>
      <text:p text:style-name="P6">• Develop faculty and staff members to meet contemporary challenges and opportunities</text:p>
      <text:h text:style-name="Heading_20_2" text:outline-level="2">Core Values</text:h>
      <text:p text:style-name="P6">BVM's educational philosophy is built on several fundamental values that guide all institutional activities:</text:p>
      <text:p text:style-name="P7"><text:span text:style-name="T2">Excellence: </text:span>Commitment to the highest standards in academics, research, and professional development</text:p>
      <text:p text:style-name="P7"><text:span text:style-name="T2">Integrity: </text:span>Maintaining ethical standards and transparency in all operations and interactions</text:p>
      <text:p text:style-name="P7"><text:span text:style-name="T2">Innovation: </text:span>Encouraging creative thinking, research, and development of novel solutions</text:p>
      <text:p text:style-name="P7"><text:span text:style-name="T2">Social Responsibility: </text:span>Developing engineers who contribute positively to society and the environment</text:p>
      <text:p text:style-name="P6"><text:span text:style-name="T2">Inclusiveness: </text:span>Creating an environment that values diversity and provides equal opportunities to all</text:p>
      <text:h text:style-name="Heading_20_2" text:outline-level="2">Alignment with National Education Policy 2020</text:h>
      <text:p text:style-name="P6">BVM has proactively aligned its academic programs and institutional practices with the National Education Policy (NEP) 2020. This includes implementing flexible curriculum structures, promoting multidisciplinary learning through B.Tech with MINOR/HONOURS <text:soft-page-break/>programs, emphasizing experiential learning, and introducing initiatives like daily yoga sessions to promote holistic development. The college is committed to transforming education delivery to meet the aspirations of NEP 2020 while maintaining its legacy of excellence.</text:p>
      <text:p text:style-name="Standard"/>
      <text:h text:style-name="P10" text:outline-level="1">Management and Governance</text:h>
      <text:h text:style-name="Heading_20_2" text:outline-level="2">Charutar Vidya Mandal</text:h>
      <text:p text:style-name="P6">Birla Vishvakarma Mahavidyalaya is managed by Charutar Vidya Mandal (CVM), one of Gujarat's most respected educational societies. CVM was established with the objective of promoting quality education across various disciplines and has a distinguished history of managing multiple educational institutions in the Vallabh Vidyanagar region. The Mandal provides strategic direction, financial oversight, and ensures the institution adheres to the highest standards of academic and administrative excellence.</text:p>
      <text:h text:style-name="Heading_20_2" text:outline-level="2">Chairman of CVM and Board of Governors</text:h>
      <text:p text:style-name="P6">Er. Bhikhubhai Patel serves as the Chairman of Charutar Vidya Mandal and the Board of Governors of BVM. An alumnus of BVM himself, Er. Patel brings valuable industry experience and educational leadership to the institution. In recognition of his contributions to education and society, he was honored with the prestigious Gujarat Garima Award. His leadership has been instrumental in modernizing infrastructure, strengthening industry partnerships, and maintaining the institution's commitment to excellence.</text:p>
      <text:h text:style-name="Heading_20_2" text:outline-level="2">Principal and Academic Leadership</text:h>
      <text:p text:style-name="P6">Prof. (Dr.) Vinay J. Patel currently serves as the In-Charge Principal of BVM Engineering College. Dr. Patel brings extensive academic and research experience to this leadership role. His vision focuses on building a robust research ecosystem, strengthening industry-academia partnerships, enhancing placement outcomes, and promoting student-led innovation and entrepreneurship. Under his leadership, the college is working to transform BVM into a regional innovation hub and global talent powerhouse.</text:p>
      <text:h text:style-name="Heading_20_2" text:outline-level="2">Board of Governors</text:h>
      <text:p text:style-name="P6">The Board of Governors (BoG) is the apex decision-making body of the autonomous institution. It comprises representatives from CVM management, distinguished academicians, industry leaders, and alumni. The BoG is responsible for policy formulation, strategic planning, resource allocation, and ensuring the institution maintains high standards of education and research. Regular BoG meetings ensure transparent governance and alignment with institutional objectives.</text:p>
      <text:h text:style-name="Heading_20_2" text:outline-level="2">Dean Council and Administrative Structure</text:h>
      <text:p text:style-name="P6">The Dean Council provides academic and administrative leadership across various functional areas. The council typically includes Deans for Academics, Research &amp; Development, Student Welfare, Industry-Institute Interaction, and Administration. This decentralized structure ensures effective implementation of policies and programs. <text:soft-page-break/>Department heads lead individual engineering departments and report to the academic dean, creating a clear chain of responsibility and accountability.</text:p>
      <text:h text:style-name="Heading_20_2" text:outline-level="2">Statutory Bodies and Committees</text:h>
      <text:p text:style-name="P6">BVM has established several statutory bodies and committees to ensure proper governance and compliance:</text:p>
      <text:p text:style-name="P7">• Internal Quality Assurance Cell (IQAC) - Coordinates NAAC accreditation and quality enhancement initiatives</text:p>
      <text:p text:style-name="P7">• Board of Studies (BoS) - Designs and updates curricula for each department</text:p>
      <text:p text:style-name="P7">• Academic Council - Approves academic programs, regulations, and policies</text:p>
      <text:p text:style-name="P7">• Finance Committee - Oversees financial planning and budget allocation</text:p>
      <text:p text:style-name="P7">• Grievance Redressal Committee - Addresses student and faculty concerns</text:p>
      <text:p text:style-name="P6">• Anti-Ragging Committee and Women's Development Cell - Ensure safe campus environment</text:p>
      <text:p text:style-name="Standard"/>
      <text:h text:style-name="P10" text:outline-level="1">Academic Programs and Curriculum</text:h>
      <text:h text:style-name="Heading_20_2" text:outline-level="2">Undergraduate Programs (B.Tech)</text:h>
      <text:p text:style-name="P6">BVM offers 9 undergraduate Bachelor of Technology (B.Tech) programs across core and emerging engineering disciplines. These four-year programs are designed to provide a strong foundation in engineering fundamentals combined with specialized knowledge and practical skills. The undergraduate programs includ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text:span text:style-name="T8">Program</text:span></text:p>
          </table:table-cell>
          <table:table-cell table:style-name="Table1.A1" office:value-type="string">
            <text:p text:style-name="Standard"><text:span text:style-name="T8">Duration</text:span></text:p>
          </table:table-cell>
          <table:table-cell table:style-name="Table1.A1" office:value-type="string">
            <text:p text:style-name="Standard"><text:span text:style-name="T8">Seats</text:span></text:p>
          </table:table-cell>
          <table:table-cell table:style-name="Table1.A1" office:value-type="string">
            <text:p text:style-name="Standard"><text:span text:style-name="T8">Branch Code</text:span></text:p>
          </table:table-cell>
        </table:table-row>
        <table:table-row table:style-name="Table1.1">
          <table:table-cell table:style-name="Table1.A2" office:value-type="string">
            <text:p text:style-name="Standard">Civil Engineering</text:p>
          </table:table-cell>
          <table:table-cell table:style-name="Table1.A2" office:value-type="string">
            <text:p text:style-name="Standard">4 Years</text:p>
          </table:table-cell>
          <table:table-cell table:style-name="Table1.A2" office:value-type="string">
            <text:p text:style-name="Standard">120</text:p>
          </table:table-cell>
          <table:table-cell table:style-name="Table1.A2" office:value-type="string">
            <text:p text:style-name="Standard">CE</text:p>
          </table:table-cell>
        </table:table-row>
        <table:table-row table:style-name="Table1.1">
          <table:table-cell table:style-name="Table1.A2" office:value-type="string">
            <text:p text:style-name="Standard">Structural Engineering</text:p>
          </table:table-cell>
          <table:table-cell table:style-name="Table1.A2" office:value-type="string">
            <text:p text:style-name="Standard">4 Years</text:p>
          </table:table-cell>
          <table:table-cell table:style-name="Table1.A2" office:value-type="string">
            <text:p text:style-name="Standard">30</text:p>
          </table:table-cell>
          <table:table-cell table:style-name="Table1.A2" office:value-type="string">
            <text:p text:style-name="Standard">ST</text:p>
          </table:table-cell>
        </table:table-row>
        <table:table-row table:style-name="Table1.1">
          <table:table-cell table:style-name="Table1.A2" office:value-type="string">
            <text:p text:style-name="Standard">Computer Engineering</text:p>
          </table:table-cell>
          <table:table-cell table:style-name="Table1.A2" office:value-type="string">
            <text:p text:style-name="Standard">4 Years</text:p>
          </table:table-cell>
          <table:table-cell table:style-name="Table1.A2" office:value-type="string">
            <text:p text:style-name="Standard">120</text:p>
          </table:table-cell>
          <table:table-cell table:style-name="Table1.A2" office:value-type="string">
            <text:p text:style-name="Standard">CO</text:p>
          </table:table-cell>
        </table:table-row>
        <table:table-row table:style-name="Table1.1">
          <table:table-cell table:style-name="Table1.A2" office:value-type="string">
            <text:p text:style-name="Standard">Electronics Engineering</text:p>
          </table:table-cell>
          <table:table-cell table:style-name="Table1.A2" office:value-type="string">
            <text:p text:style-name="Standard">4 Years</text:p>
          </table:table-cell>
          <table:table-cell table:style-name="Table1.A2" office:value-type="string">
            <text:p text:style-name="Standard">60</text:p>
          </table:table-cell>
          <table:table-cell table:style-name="Table1.A2" office:value-type="string">
            <text:p text:style-name="Standard">EL</text:p>
          </table:table-cell>
        </table:table-row>
        <table:table-row table:style-name="Table1.1">
          <table:table-cell table:style-name="Table1.A2" office:value-type="string">
            <text:p text:style-name="Standard">Electrical Engineering</text:p>
          </table:table-cell>
          <table:table-cell table:style-name="Table1.A2" office:value-type="string">
            <text:p text:style-name="Standard">4 Years</text:p>
          </table:table-cell>
          <table:table-cell table:style-name="Table1.A2" office:value-type="string">
            <text:p text:style-name="Standard">120</text:p>
          </table:table-cell>
          <table:table-cell table:style-name="Table1.A2" office:value-type="string">
            <text:p text:style-name="Standard">ED</text:p>
          </table:table-cell>
        </table:table-row>
        <table:table-row table:style-name="Table1.1">
          <table:table-cell table:style-name="Table1.A2" office:value-type="string">
            <text:p text:style-name="Standard">Mechanical Engineering</text:p>
          </table:table-cell>
          <table:table-cell table:style-name="Table1.A2" office:value-type="string">
            <text:p text:style-name="Standard">4 Years</text:p>
          </table:table-cell>
          <table:table-cell table:style-name="Table1.A2" office:value-type="string">
            <text:p text:style-name="Standard">120</text:p>
          </table:table-cell>
          <table:table-cell table:style-name="Table1.A2" office:value-type="string">
            <text:p text:style-name="Standard">ME</text:p>
          </table:table-cell>
        </table:table-row>
        <table:table-row table:style-name="Table1.1">
          <table:table-cell table:style-name="Table1.A2" office:value-type="string">
            <text:p text:style-name="Standard">Production Engineering</text:p>
          </table:table-cell>
          <table:table-cell table:style-name="Table1.A2" office:value-type="string">
            <text:p text:style-name="Standard">4 Years</text:p>
          </table:table-cell>
          <table:table-cell table:style-name="Table1.A2" office:value-type="string">
            <text:p text:style-name="Standard">30</text:p>
          </table:table-cell>
          <table:table-cell table:style-name="Table1.A2" office:value-type="string">
            <text:p text:style-name="Standard">PE</text:p>
          </table:table-cell>
        </table:table-row>
        <table:table-row table:style-name="Table1.1">
          <table:table-cell table:style-name="Table1.A2" office:value-type="string">
            <text:p text:style-name="Standard">Electronics &amp; Communication</text:p>
          </table:table-cell>
          <table:table-cell table:style-name="Table1.A2" office:value-type="string">
            <text:p text:style-name="Standard">4 Years</text:p>
          </table:table-cell>
          <table:table-cell table:style-name="Table1.A2" office:value-type="string">
            <text:p text:style-name="Standard">60</text:p>
          </table:table-cell>
          <table:table-cell table:style-name="Table1.A2" office:value-type="string">
            <text:p text:style-name="Standard">EC</text:p>
          </table:table-cell>
        </table:table-row>
        <table:table-row table:style-name="Table1.1">
          <table:table-cell table:style-name="Table1.A2" office:value-type="string">
            <text:p text:style-name="Standard">Information Technology</text:p>
          </table:table-cell>
          <table:table-cell table:style-name="Table1.A2" office:value-type="string">
            <text:p text:style-name="Standard">4 Years</text:p>
          </table:table-cell>
          <table:table-cell table:style-name="Table1.A2" office:value-type="string">
            <text:p text:style-name="Standard">60</text:p>
          </table:table-cell>
          <table:table-cell table:style-name="Table1.A2" office:value-type="string">
            <text:p text:style-name="Standard">IT</text:p>
          </table:table-cell>
        </table:table-row>
      </table:table>
      <text:p text:style-name="P8">Total annual intake: 807 students</text:p>
      <text:h text:style-name="Heading_20_2" text:outline-level="2">Postgraduate Programs (M.Tech)</text:h>
      <text:p text:style-name="P6">BVM offers 7 postgraduate Master of Technology (M.Tech) programs designed to provide advanced knowledge and research experience in specialized areas. These two-year programs emphasize research, project work, and industry-relevant applications. Admission to M.Tech programs is through GATE scores or Gujarat PGCET examination.</text:p>
      <text:p text:style-name="P7">• M.Tech in Mechanical Engineering</text:p>
      <text:p text:style-name="P7">• M.Tech in Computer Engineering</text:p>
      <text:p text:style-name="P7">• M.Tech in Electrical Engineering</text:p>
      <text:p text:style-name="P7">• M.Tech in Environmental Engineering</text:p>
      <text:p text:style-name="P7">• M.Tech in Structural Engineering</text:p>
      <text:p text:style-name="P7">• M.Tech in Electronics &amp; Communication</text:p>
      <text:p text:style-name="P6">• M.Tech in Power Electronics and Drives</text:p>
      <text:h text:style-name="Heading_20_2" text:outline-level="2">Doctoral Programs (Ph.D.)</text:h>
      <text:p text:style-name="P6">BVM offers full-time and part-time Ph.D. programs in various engineering disciplines. The doctoral program encourages original research and aims to develop expertise in <text:soft-page-break/>emerging areas of engineering and technology. Faculty members serve as research supervisors, guiding scholars through rigorous research methodology and dissertation work. The college has established research facilities and collaborations to support quality doctoral research.</text:p>
      <text:h text:style-name="Heading_20_2" text:outline-level="2">B.Tech with MINOR/HONOURS</text:h>
      <text:p text:style-name="P6">In alignment with NEP 2020, BVM has introduced B.Tech with MINOR and HONOURS programs. These programs allow students to pursue interdisciplinary learning by choosing courses from other engineering streams or emerging technology areas. This flexibility enables students to develop broader skill sets and adapt to evolving industry requirements. The HONOURS program provides an opportunity for high-performing students to engage in advanced coursework and research in their chosen specialization.</text:p>
      <text:h text:style-name="P11" text:outline-level="2"><text:span text:style-name="T10">BVM AI Workshop</text:span> </text:h>
      <text:p text:style-name="Text_20_body">The institute is conductin a very large workshop on the topic <text:span text:style-name="T11">Tectonic Shift: Age of Generative/Agentic AI</text:span> . This workshop is convened by Dr. R. B. Gandhi at the BVM campus at Anand on 14 Feb 2026</text:p>
      <text:h text:style-name="P10" text:outline-level="1">Engineering Departments</text:h>
      <text:p text:style-name="P6">BVM's academic structure comprises nine specialized engineering departments, each equipped with state-of-the-art laboratories, experienced faculty, and strong industry connections. These departments form the backbone of the institution's teaching, research, and industry engagement activities.</text:p>
      <text:h text:style-name="Heading_20_2" text:outline-level="2">Department of Civil Engineering</text:h>
      <text:p text:style-name="P6">As one of the legacy departments established in 1948, Civil Engineering has been a flagship program at BVM for over 75 years. The department offers B.Tech in Civil Engineering, M.Tech in Structural Engineering and Environmental Engineering, and Ph.D. programs. With a strong emphasis on sustainable infrastructure development, the department maintains well-equipped laboratories for concrete technology, soil mechanics, hydraulics, environmental engineering, and surveying. The department has active collaborations with construction companies and consulting firms, providing students with excellent internship and placement opportunities.</text:p>
      <text:h text:style-name="Heading_20_2" text:outline-level="2">Department of Structural Engineering</text:h>
      <text:p text:style-name="P6">The Structural Engineering department specializes in the design and analysis of structures, earthquake engineering, and advanced construction materials. The department houses sophisticated laboratories for structural testing, including NDT (Non-Destructive Testing) equipment. Faculty members are engaged in research on seismic-resistant structures, green building technologies, and innovative construction methods. The department has strong linkages with major construction and infrastructure companies.</text:p>
      <text:h text:style-name="Heading_20_2" text:outline-level="2">Department of Computer Engineering</text:h>
      <text:p text:style-name="P6">The Computer Engineering department is one of the most sought-after programs at BVM, consistently achieving near 100% placement rates. The department offers comprehensive coverage of software engineering, data structures, algorithms, artificial intelligence, machine learning, and cloud computing. Students benefit from high-end computing facilities, dedicated laboratories for AI/ML and cybersecurity, and strong industry partnerships with leading IT companies. The department hosts student chapters of ACM, IEEE Computer Society, and CSI, providing additional learning and networking opportunities.</text:p>
      <text:h text:style-name="Heading_20_2" text:outline-level="2">Department of Electronics Engineering</text:h>
      <text:p text:style-name="P6">The Electronics Engineering department focuses on electronic devices, circuits, embedded systems, and VLSI design. The department maintains laboratories for analog and digital electronics, microprocessors, embedded systems, and communication systems. Faculty members are engaged in research on IoT applications, sensor technologies, and renewable energy electronics. The recently inaugurated Medical <text:soft-page-break/>Electronics Sensors and Instrumentation Center (MESIC) demonstrates the department's expansion into healthcare technology applications.</text:p>
      <text:h text:style-name="Heading_20_2" text:outline-level="2">Department of Electrical Engineering</text:h>
      <text:p text:style-name="P6">The Electrical Engineering department covers power systems, electrical machines, power electronics, renewable energy systems, and smart grid technologies. The department has well-equipped laboratories for electrical machines, power systems, control systems, and high voltage engineering. With increasing focus on renewable energy, the department has established collaborations with power generation and distribution companies. The department offers M.Tech specialization in Power Electronics and Drives, addressing industry demand for advanced power electronics expertise.</text:p>
      <text:h text:style-name="Heading_20_2" text:outline-level="2">Department of Mechanical Engineering</text:h>
      <text:p text:style-name="P6">Mechanical Engineering, another legacy department from 1948, offers comprehensive programs in thermal engineering, manufacturing, design, and automation. The department houses laboratories for fluid mechanics, thermodynamics, manufacturing processes, CAD/CAM, robotics, and materials testing. The Digital Manufacturing Lab represents the department's commitment to Industry 4.0 technologies. Faculty members conduct research in areas like renewable energy, advanced manufacturing, and automotive engineering. The department maintains strong industry connections with automotive, manufacturing, and energy sectors.</text:p>
      <text:h text:style-name="Heading_20_2" text:outline-level="2">Department of Production Engineering</text:h>
      <text:p text:style-name="P6">The Production Engineering department specializes in manufacturing processes, industrial engineering, operations research, and supply chain management. The department provides hands-on training in modern manufacturing techniques, CNC machining, automation, and quality control. Students engage with industry through internships at manufacturing units and industrial projects. The curriculum emphasizes lean manufacturing, Six Sigma, and other industry-standard methodologies.</text:p>
      <text:h text:style-name="Heading_20_2" text:outline-level="2">Department of Electronics &amp; Communication</text:h>
      <text:p text:style-name="P6">The Electronics &amp; Communication (EC) department focuses on communication systems, signal processing, microwave engineering, and wireless technologies. The department maintains laboratories for digital communication, optical fiber communication, microwave engineering, and antenna design. EC students have access to modern communication equipment and software tools for system design and analysis. The department achieves strong placement outcomes with telecommunications companies and electronics firms. Recent student achievements include winning the Devang Mehta IT Awards.</text:p>
      <text:h text:style-name="Heading_20_2" text:outline-level="2"><text:soft-page-break/>Department of Information Technology</text:h>
      <text:p text:style-name="P6">The Information Technology department consistently achieves the highest placement rates at BVM, often reaching 97-100%. The curriculum covers software development, database systems, web technologies, mobile computing, and cybersecurity. Students benefit from dedicated IT infrastructure, software development labs, and partnerships with technology companies. The department encourages participation in hackathons, coding competitions, and open-source projects. Strong industry connect ensures curriculum remains relevant to evolving technology landscape.</text:p>
      <text:h text:style-name="Heading_20_2" text:outline-level="2">Department of Mathematics</text:h>
      <text:p text:style-name="P6">The Mathematics department provides foundational courses in engineering mathematics, statistics, numerical methods, and computational mathematics to all engineering students. The department plays a crucial role in developing analytical and problem-solving skills essential for engineering applications. Faculty members are involved in research on applied mathematics, optimization techniques, and mathematical modeling of engineering systems.</text:p>
      <text:p text:style-name="Standard"/>
      <text:h text:style-name="P10" text:outline-level="1">Research and Development</text:h>
      <text:h text:style-name="Heading_20_2" text:outline-level="2">Research Culture and Focus</text:h>
      <text:p text:style-name="P6">BVM has established a vibrant research ecosystem that encourages both faculty and students to engage in cutting-edge exploration across engineering disciplines. The institution recognizes research as a strategic pillar for academic excellence and industry relevance. The R&amp;D Cell coordinates research activities, facilitates funding applications, manages intellectual property, and promotes interdisciplinary collaboration.</text:p>
      <text:h text:style-name="Heading_20_2" text:outline-level="2">Research Centers and Facilities</text:h>
      <text:p text:style-name="P6">BVM has established several specialized research centers:</text:p>
      <text:p text:style-name="P7"><text:span text:style-name="T2">Center of Excellence: </text:span>Set up by SLS, focusing on advanced engineering research and industry collaboration</text:p>
      <text:p text:style-name="P7"><text:span text:style-name="T2">Digital Manufacturing Lab: </text:span>Equipped with Industry 4.0 technologies for advanced manufacturing research</text:p>
      <text:p text:style-name="P7"><text:span text:style-name="T2">MESIC (Medical Electronics Sensors and Instrumentation Center): </text:span>Recently inaugurated center for healthcare technology research</text:p>
      <text:p text:style-name="P6"><text:span text:style-name="T2">Testing and Certification Labs: </text:span>Recognized for materials testing, BIS certifications, environmental auditing, and instrument calibration</text:p>
      <text:h text:style-name="Heading_20_2" text:outline-level="2">Research Publications and Patents</text:h>
      <text:p text:style-name="P6">BVM faculty members actively publish research papers in peer-reviewed international journals and conferences. The institution encourages patent filing and has established processes for intellectual property management. Faculty members have significant publications indexed in Scopus, Web of Science, and other databases. The college maintains profiles on platforms like VIDWAN and IRINS to showcase research output and facilitate academic networking.</text:p>
      <text:h text:style-name="Heading_20_2" text:outline-level="2">Sponsored Research and Consultancy</text:h>
      <text:p text:style-name="P6">The institution actively pursues sponsored research projects from government funding agencies like DST, SERB, AICTE, and industry partners. Faculty members provide consultancy services to industry in areas like structural analysis, materials testing, software development, and process optimization. This industry engagement not only generates revenue but also keeps faculty updated with real-world challenges and provides students with exposure to practical applications.</text:p>
      <text:h text:style-name="Heading_20_2" text:outline-level="2">Student Research Initiatives</text:h>
      <text:p text:style-name="P6">BVM promotes research culture from the undergraduate level itself. Students participate in:</text:p>
      <text:p text:style-name="P7"><text:soft-page-break/>• Final year projects with research orientation</text:p>
      <text:p text:style-name="P7">• Summer internships at research organizations like IITs, NITs, and DRDO labs</text:p>
      <text:p text:style-name="P7">• Technical paper presentations at national and international conferences</text:p>
      <text:p text:style-name="P7">• Participation in national hackathons and innovation challenges</text:p>
      <text:p text:style-name="P6">• SSIP (Student Startup and Innovation Policy) initiatives encouraging entrepreneurship</text:p>
      <text:h text:style-name="Heading_20_2" text:outline-level="2">National and International Conferences</text:h>
      <text:p text:style-name="P6">BVM regularly hosts national and international conferences, workshops, and symposia:</text:p>
      <text:p text:style-name="P7">• ICWSTCSC (International Conference on Web Services, Cloud Computing, and Convergence) - 2018, 2023</text:p>
      <text:p text:style-name="P7">• ICRISET (International Conference on Recent Innovations in Science, Engineering and Technology) - 2017, 2020</text:p>
      <text:p text:style-name="P7">• National Symposium on Civil Infrastructure World (CIW:2030)</text:p>
      <text:p text:style-name="P6">• Multiple national workshops on emerging technologies and domain-specific topics</text:p>
      <text:h text:style-name="Heading_20_2" text:outline-level="2">Collaborations and Research Networks</text:h>
      <text:p text:style-name="P6">BVM has developed research collaborations with:</text:p>
      <text:p text:style-name="P7">• Sardar Patel University for interdisciplinary research in materials science and biosciences</text:p>
      <text:p text:style-name="P7">• Other engineering colleges like SVNIT Surat and LD Engineering College</text:p>
      <text:p text:style-name="P7">• Industry partners for applied research projects</text:p>
      <text:p text:style-name="P6">• International universities for faculty and student exchange programs</text:p>
      <text:p text:style-name="Standard"/>
      <text:h text:style-name="P10" text:outline-level="1">Faculty and Academic Excellence</text:h>
      <text:h text:style-name="Heading_20_2" text:outline-level="2">Faculty Strength and Qualifications</text:h>
      <text:p text:style-name="P6">BVM employs approximately 132 faculty members across all departments, including professors, associate professors, and assistant professors. The faculty comprises highly qualified individuals with Ph.D. degrees, M.Tech/M.E. qualifications, and extensive industry and teaching experience. Many faculty members have graduated from premier institutions like IITs, NITs, and other leading universities in India and abroad.</text:p>
      <text:h text:style-name="Heading_20_2" text:outline-level="2">Distinguished Faculty Members</text:h>
      <text:p text:style-name="P6">Several faculty members have made significant contributions to engineering education and research:</text:p>
      <text:p text:style-name="P7"><text:span text:style-name="T2">Dr. S.D. Dhiman: </text:span>Principal and Head of Civil Engineering Department, with 281 citations and h-index of 7, serving as NAAC Coordinator and Chairman BoS</text:p>
      <text:p text:style-name="P7"><text:span text:style-name="T2">Dr. D.S. Vyas: </text:span>Dean Academics with extensive research publications</text:p>
      <text:p text:style-name="P6">Various department heads and senior faculty members actively publish in international journals and guide Ph.D. scholars</text:p>
      <text:h text:style-name="Heading_20_2" text:outline-level="2">Faculty Development Programs</text:h>
      <text:p text:style-name="P6">BVM emphasizes continuous faculty development through:</text:p>
      <text:p text:style-name="P7">• Regular Faculty Development Programs (FDPs) on emerging technologies and pedagogical methods</text:p>
      <text:p text:style-name="P7">• TEQIP-funded training programs for advanced skills development</text:p>
      <text:p text:style-name="P7">• Encouragement for pursuing Ph.D. and post-doctoral research</text:p>
      <text:p text:style-name="P7">• Participation in national and international conferences</text:p>
      <text:p text:style-name="P7">• Industry internships and collaborative research projects</text:p>
      <text:p text:style-name="P6">• Workshops on outcome-based education, NEP 2020 implementation, and accreditation processes</text:p>
      <text:h text:style-name="Heading_20_2" text:outline-level="2">Teaching Methodology and Innovation</text:h>
      <text:p text:style-name="P6">Faculty members employ diverse teaching methodologies including:</text:p>
      <text:p text:style-name="P7">• Tech-enabled classrooms with smart boards and multimedia projectors</text:p>
      <text:p text:style-name="P7">• ICT-based learning resources and online platforms</text:p>
      <text:p text:style-name="P7">• Problem-based learning and case study methods</text:p>
      <text:p text:style-name="P7">• Industry expert lectures and guest sessions</text:p>
      <text:p text:style-name="P7"><text:soft-page-break/>• Project-based assessments and experiential learning</text:p>
      <text:p text:style-name="P6">• Participation in NPTEL courses and SWAYAM platform for enhanced learning</text:p>
      <text:h text:style-name="Heading_20_2" text:outline-level="2">Recognition and Awards</text:h>
      <text:p text:style-name="P6">BVM was recognized as a Valuable NPTEL Chapter and received the Excelling in Physics Award from NPTEL/SWAYAM, demonstrating faculty commitment to leveraging online learning platforms for student benefit.</text:p>
      <text:p text:style-name="Standard"/>
      <text:h text:style-name="P10" text:outline-level="1">Infrastructure and Facilities</text:h>
      <text:h text:style-name="Heading_20_2" text:outline-level="2">Campus Overview</text:h>
      <text:p text:style-name="P6">BVM's 18.96-acre campus in Vallabh Vidyanagar combines heritage architecture with modern facilities. The campus features a blend of historic buildings from 1948 and contemporary infrastructure, creating an environment conducive to learning and research. The green campus incorporates eco-friendly initiatives including solar power installations, rainwater harvesting systems, and extensive plantation, demonstrating institutional commitment to sustainability.</text:p>
      <text:h text:style-name="Heading_20_2" text:outline-level="2">M.A. Patel BVM Library</text:h>
      <text:p text:style-name="P6">The central library houses over 72,000 books, 250 journals and periodicals, and extensive digital resources. The library provides:</text:p>
      <text:p text:style-name="P7">• Access to e-journals, e-books, and digital databases</text:p>
      <text:p text:style-name="P7">• Reading halls with seating capacity for hundreds of students</text:p>
      <text:p text:style-name="P7">• Reference section with technical encyclopedias and handbooks</text:p>
      <text:p text:style-name="P7">• Digital library with computer terminals for online access</text:p>
      <text:p text:style-name="P6">• Membership in library consortiums for access to global resources</text:p>
      <text:h text:style-name="Heading_20_2" text:outline-level="2">Laboratory Facilities</text:h>
      <text:p text:style-name="P6">BVM maintains 25+ specialized laboratories equipped with latest instruments and technology:</text:p>
      <text:p text:style-name="P7">• Engineering workshops for mechanical, electrical, and production training</text:p>
      <text:p text:style-name="P7">• Computer laboratories with high-configuration workstations</text:p>
      <text:p text:style-name="P7">• Electronics and communication labs with modern testing equipment</text:p>
      <text:p text:style-name="P7">• Civil engineering labs for concrete, soil, and materials testing</text:p>
      <text:p text:style-name="P7">• Research laboratories for specialized projects</text:p>
      <text:p text:style-name="P6">• Digital Manufacturing Lab with Industry 4.0 equipment</text:p>
      <text:h text:style-name="Heading_20_2" text:outline-level="2">Hostel Facilities</text:h>
      <text:p text:style-name="P6">Separate hostel facilities for boys and girls can accommodate over 2,000 students. Hostel amenities include:</text:p>
      <text:p text:style-name="P7">• A.M. Naik House of Scholars with premium AC rooms and attached bathrooms</text:p>
      <text:p text:style-name="P7">• Multiple residential blocks with both standard and modern living options</text:p>
      <text:p text:style-name="P7">• Wi-Fi connectivity throughout hostel premises</text:p>
      <text:p text:style-name="P7"><text:soft-page-break/>• Recreational facilities and common rooms</text:p>
      <text:p text:style-name="P7">• Mess services providing nutritious meals</text:p>
      <text:p text:style-name="P6">• 24/7 security and medical facilities</text:p>
      <text:h text:style-name="Heading_20_2" text:outline-level="2">Sports and Recreation</text:h>
      <text:p text:style-name="P6">Comprehensive sports infrastructure supports physical fitness and competitive sports:</text:p>
      <text:p text:style-name="P7">• Cricket ground and practice nets</text:p>
      <text:p text:style-name="P7">• Football field</text:p>
      <text:p text:style-name="P7">• Badminton courts (recent Zone-3 tournament winners)</text:p>
      <text:p text:style-name="P7">• Table tennis facilities</text:p>
      <text:p text:style-name="P7">• Kabaddi court (Zone-3 tournament champions)</text:p>
      <text:p text:style-name="P7">• Volleyball and basketball courts</text:p>
      <text:p text:style-name="P6">• Well-equipped gymnasium</text:p>
      <text:h text:style-name="Heading_20_2" text:outline-level="2">Other Facilities</text:h>
      <text:p text:style-name="P7">• Auditorium with 350+ seating capacity for events and seminars</text:p>
      <text:p text:style-name="P7">• Conference rooms for meetings and workshops</text:p>
      <text:p text:style-name="P7">• Campus-wide Wi-Fi connectivity</text:p>
      <text:p text:style-name="P7">• Cafeteria and canteen facilities</text:p>
      <text:p text:style-name="P7">• Medical center with qualified medical staff</text:p>
      <text:p text:style-name="P7">• Banking and ATM facilities</text:p>
      <text:p text:style-name="P6">• Transportation services connecting to nearby cities</text:p>
      <text:p text:style-name="Standard"/>
      <text:h text:style-name="P10" text:outline-level="1">Accreditations, Rankings, and Recognition</text:h>
      <text:h text:style-name="Heading_20_2" text:outline-level="2">AICTE Approval</text:h>
      <text:p text:style-name="P6">BVM is approved by the All India Council for Technical Education (AICTE), the statutory body for technical education in India. This approval ensures that the institution meets prescribed standards for infrastructure, faculty qualifications, and academic delivery. Regular inspections and compliance reports maintain this accreditation.</text:p>
      <text:h text:style-name="Heading_20_2" text:outline-level="2">Autonomous Status</text:h>
      <text:p text:style-name="P6">Granted autonomous status by UGC in August 2015, BVM became Gujarat's first autonomous engineering institute. This status recognizes the institution's academic excellence and provides flexibility in curriculum design, examination patterns, and academic governance while maintaining affiliation with Gujarat Technological University.</text:p>
      <text:h text:style-name="Heading_20_2" text:outline-level="2">NBA Accreditation</text:h>
      <text:p text:style-name="P6">Several programs at BVM have received accreditation from the National Board of Accreditation (NBA), demonstrating compliance with international standards through the Washington Accord. NBA accreditation validates the quality of educational delivery, infrastructure, and learning outcomes. The accreditation process involves rigorous self-assessment and peer review.</text:p>
      <text:h text:style-name="Heading_20_2" text:outline-level="2">NAAC Assessment</text:h>
      <text:p text:style-name="P6">BVM has undergone assessment by the National Assessment and Accreditation Council (NAAC) and holds A+ grade accreditation. The NAAC assessment evaluates institutions across seven criteria including curricular aspects, teaching-learning, research, infrastructure, student support, governance, and institutional values. The A+ grade reflects BVM's commitment to quality in all these dimensions.</text:p>
      <text:h text:style-name="Heading_20_2" text:outline-level="2">NIRF Rankings</text:h>
      <text:p text:style-name="P6">BVM participates in the National Institutional Ranking Framework (NIRF) annually, submitting comprehensive data on various parameters. The institution has been ranked in the 251-300 band under Engineering category by NIRF. BVM maintains transparency by publishing NIRF data reports for years 2017 through 2025 on its website.</text:p>
      <text:h text:style-name="Heading_20_2" text:outline-level="2">Other Rankings and Recognition</text:h>
      <text:p text:style-name="P7">• Ranked 107 among Top Engineering Colleges by Times of India Survey</text:p>
      <text:p text:style-name="P7">• Recognized among top 1% colleges in Gujarat for placement assistance</text:p>
      <text:p text:style-name="P6">• First engineering college established in Gujarat (1948)</text:p>
      <text:h text:style-name="Heading_20_2" text:outline-level="2"><text:soft-page-break/>Industry Recognition</text:h>
      <text:p text:style-name="P6">The college has established recognition from Bureau of Indian Standards (BIS) for testing and certification, environmental auditing capabilities, and calibration services for electrical, electronics, and mechanical instruments. These certifications enable the college to provide technical services to industry while generating revenue.</text:p>
      <text:h text:style-name="Heading_20_2" text:outline-level="2">TEQIP Recognition</text:h>
      <text:p text:style-name="P6">BVM has been a beneficiary of Technical Education Quality Improvement Programme (TEQIP) Phase II and Phase III. These World Bank-assisted programs supported infrastructure development, faculty development, research activities, and quality enhancement initiatives. TEQIP funding enabled establishment of advanced laboratories, faculty training programs, and student development activities.</text:p>
      <text:p text:style-name="Standard"/>
      <text:h text:style-name="P10" text:outline-level="1">Student Activities and Professional Societies</text:h>
      <text:p text:style-name="P6">BVM offers a thriving environment for student engagement beyond academics through numerous professional societies, technical clubs, and cultural organizations. These platforms enable students to develop leadership, teamwork, and industry-relevant skills.</text:p>
      <text:h text:style-name="Heading_20_2" text:outline-level="2">Professional Societies and Chapters</text:h>
      <text:p text:style-name="P7"><text:span text:style-name="T2">IEEE Student Chapter: </text:span>Active student branch organizing technical events, workshops, and competitions in electronics and electrical engineering</text:p>
      <text:p text:style-name="P7"><text:span text:style-name="T2">Computer Society of India (CSI): </text:span>Promotes computer science education through seminars, coding competitions, and industry interactions</text:p>
      <text:p text:style-name="P7"><text:span text:style-name="T2">Institution of Engineers India (IE(I)) Student Chapters: </text:span>Separate chapters for Civil, Mechanical, and other branches organizing technical lectures and site visits</text:p>
      <text:p text:style-name="P7"><text:span text:style-name="T2">ISTE Student Chapter: </text:span>Indian Society for Technical Education chapter conducting workshops and technical activities</text:p>
      <text:p text:style-name="P6"><text:span text:style-name="T2">IETE Student Chapter: </text:span>Focus on electronics and telecommunication engineering activities</text:p>
      <text:h text:style-name="Heading_20_2" text:outline-level="2">Technology and Innovation Clubs</text:h>
      <text:p text:style-name="P7"><text:span text:style-name="T2">The Robotics Society (TRS): </text:span>13 teams advanced to Level 3 in GUJCOST ROBOFEST 5.0, demonstrating excellence in robotics</text:p>
      <text:p text:style-name="P7"><text:span text:style-name="T2">ML Club: </text:span>Machine Learning club focusing on AI/ML projects and workshops</text:p>
      <text:p text:style-name="P7"><text:span text:style-name="T2">Google Developer Student Club (GDSC): </text:span>Google-supported club for cloud computing, Android development, and web technologies</text:p>
      <text:p text:style-name="P7"><text:span text:style-name="T2">GeeksForGeeks (GFG) Chapter: </text:span>Coding and competitive programming community</text:p>
      <text:p text:style-name="P7"><text:span text:style-name="T2">CodeChef: </text:span>Programming competitions and coding practice</text:p>
      <text:p text:style-name="P6"><text:span text:style-name="T2">Microsoft Learn Student Ambassador (MLSA): </text:span>Microsoft technology advocacy and learning</text:p>
      <text:h text:style-name="Heading_20_2" text:outline-level="2">Social Service Organizations</text:h>
      <text:p text:style-name="P7"><text:span text:style-name="T2">National Service Scheme (NSS): </text:span>Active in community service, received Award of Appreciation from Indian Red Cross Society</text:p>
      <text:p text:style-name="P6"><text:span text:style-name="T2">National Cadet Corps (NCC): </text:span>Leadership and discipline development through military training</text:p>
      <text:h text:style-name="Heading_20_2" text:outline-level="2">Entrepreneurship and Innovation</text:h>
      <text:p text:style-name="P6"><text:span text:style-name="T2">Student Startup &amp; Innovation Cell (SSIP): </text:span>Supports student entrepreneurs with <text:soft-page-break/>mentorship, resources, and funding connections</text:p>
      <text:h text:style-name="Heading_20_2" text:outline-level="2">Specialized Interest Groups</text:h>
      <text:p text:style-name="P6"><text:span text:style-name="T2">The Space Association (TSA): </text:span>Organized Anantam 2.0 - The Stargazer's Heaven, promoting astronomy and space science</text:p>
      <text:h text:style-name="Heading_20_2" text:outline-level="2">Annual Events and Festivals</text:h>
      <text:p text:style-name="P7"><text:span text:style-name="T2">UDAAN: </text:span>Annual technical and cultural festival showcasing student talents</text:p>
      <text:p text:style-name="P7"><text:span text:style-name="T2">Farewell: </text:span>Organized by juniors for graduating seniors</text:p>
      <text:p text:style-name="P7"><text:span text:style-name="T2">Annual Day: </text:span>77th Annual Day celebrated in 2025</text:p>
      <text:p text:style-name="P7"><text:span text:style-name="T2">Sports Week: </text:span>Inter-departmental and inter-college competitions</text:p>
      <text:p text:style-name="P6"><text:span text:style-name="T2">Technical Symposia: </text:span>Department-specific technical events and competitions</text:p>
      <text:h text:style-name="Heading_20_2" text:outline-level="2">Publications</text:h>
      <text:p text:style-name="P7"><text:span text:style-name="T2">Vishvakarma Magazine: </text:span>Annual college magazine featuring student articles and achievements</text:p>
      <text:p text:style-name="P6"><text:span text:style-name="T2">The Voice Newsletter: </text:span>Regular newsletter on college activities and accomplishments</text:p>
      <text:p text:style-name="Standard"/>
      <text:h text:style-name="P10" text:outline-level="1">Training and Placement</text:h>
      <text:h text:style-name="Heading_20_2" text:outline-level="2">Placement Cell Structure</text:h>
      <text:p text:style-name="P6">The Training and Placement Cell at BVM operates year-round to ensure students receive comprehensive pre-placement grooming, technical skill development, and exposure to industry requirements. The cell maintains strong relationships with over 100 companies across various sectors and coordinates all placement-related activities.</text:p>
      <text:h text:style-name="Heading_20_2" text:outline-level="2">Placement Statistics (Recent Years)</text:h>
      <table:table table:name="Table2" table:style-name="Table2">
        <table:table-column table:style-name="Table2.A" table:number-columns-repeated="3"/>
        <table:table-column table:style-name="Table2.D"/>
        <table:table-column table:style-name="Table2.E"/>
        <table:table-row table:style-name="Table2.1">
          <table:table-cell table:style-name="Table2.A1" office:value-type="string">
            <text:p text:style-name="Standard"><text:span text:style-name="T8">Branch</text:span></text:p>
          </table:table-cell>
          <table:table-cell table:style-name="Table2.A1" office:value-type="string">
            <text:p text:style-name="Standard"><text:span text:style-name="T8">2021-22</text:span></text:p>
          </table:table-cell>
          <table:table-cell table:style-name="Table2.A1" office:value-type="string">
            <text:p text:style-name="Standard"><text:span text:style-name="T8">2022-23</text:span></text:p>
          </table:table-cell>
          <table:table-cell table:style-name="Table2.A1" office:value-type="string">
            <text:p text:style-name="Standard"><text:span text:style-name="T8">2023-24</text:span></text:p>
          </table:table-cell>
          <table:table-cell table:style-name="Table2.A1" office:value-type="string">
            <text:p text:style-name="Standard"><text:span text:style-name="T8">Trend</text:span></text:p>
          </table:table-cell>
        </table:table-row>
        <table:table-row table:style-name="Table2.1">
          <table:table-cell table:style-name="Table2.A2" office:value-type="string">
            <text:p text:style-name="Standard">Civil</text:p>
          </table:table-cell>
          <table:table-cell table:style-name="Table2.A2" office:value-type="string">
            <text:p text:style-name="Standard">24%</text:p>
          </table:table-cell>
          <table:table-cell table:style-name="Table2.A2" office:value-type="string">
            <text:p text:style-name="Standard">21%</text:p>
          </table:table-cell>
          <table:table-cell table:style-name="Table2.A2" office:value-type="string">
            <text:p text:style-name="Standard">51%</text:p>
          </table:table-cell>
          <table:table-cell table:style-name="Table2.A2" office:value-type="string">
            <text:p text:style-name="Standard">↑</text:p>
          </table:table-cell>
        </table:table-row>
        <table:table-row table:style-name="Table2.1">
          <table:table-cell table:style-name="Table2.A2" office:value-type="string">
            <text:p text:style-name="Standard">Computer</text:p>
          </table:table-cell>
          <table:table-cell table:style-name="Table2.A2" office:value-type="string">
            <text:p text:style-name="Standard">75%</text:p>
          </table:table-cell>
          <table:table-cell table:style-name="Table2.A2" office:value-type="string">
            <text:p text:style-name="Standard">56%</text:p>
          </table:table-cell>
          <table:table-cell table:style-name="Table2.A2" office:value-type="string">
            <text:p text:style-name="Standard">91%</text:p>
          </table:table-cell>
          <table:table-cell table:style-name="Table2.A2" office:value-type="string">
            <text:p text:style-name="Standard">↑</text:p>
          </table:table-cell>
        </table:table-row>
        <table:table-row table:style-name="Table2.1">
          <table:table-cell table:style-name="Table2.A2" office:value-type="string">
            <text:p text:style-name="Standard">Electrical</text:p>
          </table:table-cell>
          <table:table-cell table:style-name="Table2.A2" office:value-type="string">
            <text:p text:style-name="Standard">40%</text:p>
          </table:table-cell>
          <table:table-cell table:style-name="Table2.A2" office:value-type="string">
            <text:p text:style-name="Standard">51%</text:p>
          </table:table-cell>
          <table:table-cell table:style-name="Table2.A2" office:value-type="string">
            <text:p text:style-name="Standard">78%</text:p>
          </table:table-cell>
          <table:table-cell table:style-name="Table2.A2" office:value-type="string">
            <text:p text:style-name="Standard">↑</text:p>
          </table:table-cell>
        </table:table-row>
        <table:table-row table:style-name="Table2.1">
          <table:table-cell table:style-name="Table2.A2" office:value-type="string">
            <text:p text:style-name="Standard">IT</text:p>
          </table:table-cell>
          <table:table-cell table:style-name="Table2.A2" office:value-type="string">
            <text:p text:style-name="Standard">97%</text:p>
          </table:table-cell>
          <table:table-cell table:style-name="Table2.A2" office:value-type="string">
            <text:p text:style-name="Standard">58%</text:p>
          </table:table-cell>
          <table:table-cell table:style-name="Table2.A2" office:value-type="string">
            <text:p text:style-name="Standard">97%</text:p>
          </table:table-cell>
          <table:table-cell table:style-name="Table2.A2" office:value-type="string">
            <text:p text:style-name="Standard">↑</text:p>
          </table:table-cell>
        </table:table-row>
        <table:table-row table:style-name="Table2.1">
          <table:table-cell table:style-name="Table2.A2" office:value-type="string">
            <text:p text:style-name="Standard"><text:span text:style-name="T2">TOTAL</text:span></text:p>
          </table:table-cell>
          <table:table-cell table:style-name="Table2.A2" office:value-type="string">
            <text:p text:style-name="Standard"><text:span text:style-name="T2">227</text:span></text:p>
          </table:table-cell>
          <table:table-cell table:style-name="Table2.A2" office:value-type="string">
            <text:p text:style-name="Standard"><text:span text:style-name="T2">259</text:span></text:p>
          </table:table-cell>
          <table:table-cell table:style-name="Table2.A2" office:value-type="string">
            <text:p text:style-name="Standard"><text:span text:style-name="T2">375</text:span></text:p>
          </table:table-cell>
          <table:table-cell table:style-name="Table2.A2" office:value-type="string">
            <text:p text:style-name="Standard"><text:span text:style-name="T2">↑</text:span></text:p>
          </table:table-cell>
        </table:table-row>
      </table:table>
      <text:p text:style-name="P8">Overall placement rate: Over 95% | Highest Package: INR 18 LPA | Average Package: INR 5.5-6 LPA</text:p>
      <text:h text:style-name="Heading_20_2" text:outline-level="2">Major Recruiters</text:h>
      <text:p text:style-name="P6">BVM attracts recruiters from diverse sectors including IT, core engineering, consulting, and public sector undertakings:</text:p>
      <text:p text:style-name="P7"><text:span text:style-name="T2">IT &amp; Software: </text:span>TCS, Infosys, Wipro, Cognizant, Tech Mahindra, Razorpay, BYJU's, Just Dial</text:p>
      <text:p text:style-name="P7"><text:span text:style-name="T2">Core Engineering: </text:span>L&amp;T, Larsen &amp; Toubro Power, Adani, Reliance, Essar, Torrent Power, TBEA</text:p>
      <text:p text:style-name="P7"><text:span text:style-name="T2">Electronics: </text:span>Siemens, Vyom Labs, Matrix</text:p>
      <text:p text:style-name="P6"><text:span text:style-name="T2">Infrastructure: </text:span>Patel Infrastructure Limited, various GIDC units</text:p>
      <text:h text:style-name="Heading_20_2" text:outline-level="2">Pre-Placement Training</text:h>
      <text:p text:style-name="P6">The placement cell conducts comprehensive training programs:</text:p>
      <text:p text:style-name="P7">• Technical skill development workshops</text:p>
      <text:p text:style-name="P7">• Aptitude and reasoning training</text:p>
      <text:p text:style-name="P7">• Communication and soft skills enhancement</text:p>
      <text:p text:style-name="P7">• Mock interviews and group discussions</text:p>
      <text:p text:style-name="P7">• Resume writing and LinkedIn profile optimization</text:p>
      <text:p text:style-name="P6">• Industry interaction sessions</text:p>
      <text:h text:style-name="Heading_20_2" text:outline-level="2"><text:soft-page-break/>Internship Opportunities</text:h>
      <text:p text:style-name="P6">Mandatory summer internships after 4th and 6th semesters bridge the industry-academia gap. Students secure internships at prestigious firms including L&amp;T, TCS, MG Motors, various GIDC units, and research organizations. Internships provide practical exposure and often lead to pre-placement offers.</text:p>
      <text:p text:style-name="Standard"/>
      <text:h text:style-name="P10" text:outline-level="1">Notable Alumni and Global Leadership Network</text:h>
      <text:p text:style-name="P6">With over 20,000 graduates since 1948, BVM alumni occupy leadership positions across the globe in industry, academia, government, and entrepreneurship. The strong alumni network provides mentorship, financial support, and career guidance to current students.</text:p>
      <text:h text:style-name="Heading_20_2" text:outline-level="2">Distinguished Alumni</text:h>
      <text:p text:style-name="P7"><text:span text:style-name="T2">A.M. Naik: </text:span>Group Executive Chairman of Larsen &amp; Toubro Limited, awarded Padma Vibhushan (India's second-highest civilian award) in 2019. Mr. Naik's remarkable journey from a BVM graduate to leading India's largest engineering and construction conglomerate inspires generations of students. The 'A.M. Naik House of Scholars' hostel at BVM honors his contributions.</text:p>
      <text:p text:style-name="P7"><text:span text:style-name="T2">Bhairav Trivedi: </text:span>CEO of CAB, England (1983 Graduate)</text:p>
      <text:p text:style-name="P7"><text:span text:style-name="T2">Er. Bhikhubhai Patel: </text:span>Current Chairman of CVM and BVM Board of Governors, honored with Gujarat Garima Award for contributions to education</text:p>
      <text:p text:style-name="P7"><text:span text:style-name="T2">Asokbhai C. Patel: </text:span>Principal, Phoenix, Arizona</text:p>
      <text:p text:style-name="P7"><text:span text:style-name="T2">Kishor B. Virani: </text:span>Managing Director of Karp Impex</text:p>
      <text:p text:style-name="P6"><text:span text:style-name="T2">Recent UPSC Success: </text:span>Abhishek (AIR 64) and Rajan (AIR 693) cleared UPSC 2024, demonstrating BVM alumni success beyond engineering careers</text:p>
      <text:h text:style-name="Heading_20_2" text:outline-level="2">Recent Academic Achievements</text:h>
      <text:p text:style-name="P7">• Neel Parekh - Secured admission in M.Tech at IIT Bombay</text:p>
      <text:p text:style-name="P7">• Kinjal Gokani - Secured admission in M.Tech at IISc Bengaluru</text:p>
      <text:p text:style-name="P6">• Vedant Solanki - Secured admission in M.Tech at IISc Bengaluru</text:p>
      <text:h text:style-name="Heading_20_2" text:outline-level="2">BVM Alumni Association (BVMAA)</text:h>
      <text:p text:style-name="P6">The active BVM Alumni Association maintains strong bonds among graduates and provides:</text:p>
      <text:p text:style-name="P7">• Mentorship programs connecting current students with industry professionals</text:p>
      <text:p text:style-name="P7">• Financial aid and scholarships for deserving students</text:p>
      <text:p text:style-name="P7">• Industry networking and career guidance</text:p>
      <text:p text:style-name="P7">• Alumni reunions and engagement events</text:p>
      <text:p text:style-name="P6">• Support for institutional development and infrastructure</text:p>
      <text:p text:style-name="Standard"/>
      <text:h text:style-name="P10" text:outline-level="1">International Collaborations and Global Exposure</text:h>
      <text:h text:style-name="Heading_20_2" text:outline-level="2">Strategic International Partnerships</text:h>
      <text:p text:style-name="P6">BVM has established multiple Memoranda of Understanding (MoUs) with international universities to provide students and faculty with global exposure, research collaborations, and academic exchange opportunities.</text:p>
      <text:p text:style-name="P7"><text:span text:style-name="T2">University of Wollongong, Australia: </text:span>Recent MoU signed between CVM University, BVM Engineering College, and University of Wollongong for student exchange, joint research, and faculty collaboration</text:p>
      <text:p text:style-name="P6"><text:span text:style-name="T2">Ural Federal University, Russia: </text:span>Students participated in Summer University 2025 program, experiencing international academic environment and cultural exchange</text:p>
      <text:h text:style-name="Heading_20_2" text:outline-level="2">International Experience Programs</text:h>
      <text:p text:style-name="P6">BVM students shine globally through GTU's International Experience Program (IEP), participating in:</text:p>
      <text:p text:style-name="P7">• Short-term academic programs at foreign universities</text:p>
      <text:p text:style-name="P7">• Cultural immersion and global networking</text:p>
      <text:p text:style-name="P7">• International internships and research projects</text:p>
      <text:p text:style-name="P6">• Exposure to different educational systems and methodologies</text:p>
      <text:h text:style-name="Heading_20_2" text:outline-level="2">Global-to-Global (G2G) Program</text:h>
      <text:p text:style-name="P6">The G2G @ USA 2022 program enabled select students to participate in international workshops and conferences in the United States, fostering global perspective and professional networking.</text:p>
      <text:h text:style-name="Heading_20_2" text:outline-level="2">Faculty Exchange and Research Collaboration</text:h>
      <text:p text:style-name="P6">Faculty members participate in international conferences, collaborative research projects, and visiting faculty programs at partner institutions, bringing global best practices and research methodologies to BVM.</text:p>
      <text:p text:style-name="Standard"/>
      <text:h text:style-name="P10" text:outline-level="1">Recent Achievements and Recognition</text:h>
      <text:h text:style-name="Heading_20_2" text:outline-level="2">Student Achievements (2024-2025)</text:h>
      <text:p text:style-name="P7"><text:span text:style-name="T2">Dhruv Marathe: </text:span>EC student won 1st prize of Rs. 1 lakh in Devang Mehta IT Awards</text:p>
      <text:p text:style-name="P7"><text:span text:style-name="T2">Sports Excellence: </text:span>Team BVM Kabaddi - Champions (Zone-3 Tournament 2025-26)</text:p>
      <text:p text:style-name="P7"><text:span text:style-name="T2">Badminton Success: </text:span>Boys team - Winners, Girls team - Runners-up (Zone-3 Tournament 2025-26)</text:p>
      <text:p text:style-name="P6"><text:span text:style-name="T2">Robotics Excellence: </text:span>13 teams from TRS BVM advanced to Level 3 in GUJCOST ROBOFEST 5.0</text:p>
      <text:h text:style-name="Heading_20_2" text:outline-level="2">Institutional Developments</text:h>
      <text:p text:style-name="P7"><text:span text:style-name="T2">MESIC Inauguration: </text:span>Medical Electronics Sensors and Instrumentation Center established for healthcare technology research</text:p>
      <text:p text:style-name="P7"><text:span text:style-name="T2">NEP 2020 Implementation: </text:span>Daily Yoga Sessions launched in alignment with National Education Policy</text:p>
      <text:p text:style-name="P7"><text:span text:style-name="T2">NPTEL Recognition: </text:span>Appreciation and recognition as Valuable NPTEL Chapter and Excelling in Physics Award</text:p>
      <text:p text:style-name="P6"><text:span text:style-name="T2">NSS Award: </text:span>Award of appreciation from Indian Red Cross Society on World Red Cross Day</text:p>
      <text:h text:style-name="Heading_20_2" text:outline-level="2">Leadership Appointments</text:h>
      <text:p text:style-name="P6">Prof. (Dr.) Vinay Patel appointed as Principal of BVM Engineering College, bringing fresh vision for research-driven learning and industry-focused education.</text:p>
      <text:h text:style-name="Heading_20_2" text:outline-level="2">Academic Excellence</text:h>
      <text:p text:style-name="P6">Multiple students secured admissions to premier institutions like IIT Bombay and IISc Bengaluru, while others cleared UPSC with excellent ranks, demonstrating the quality of education and diverse career outcomes achieved by BVM students.</text:p>
      <text:p text:style-name="Standard"/>
      <text:h text:style-name="P10" text:outline-level="1">Admission Process and Fee Structure</text:h>
      <text:h text:style-name="Heading_20_2" text:outline-level="2">B.Tech Admission</text:h>
      <text:p text:style-name="P6">Admission to B.Tech programs is conducted through the Admission Committee for Professional Courses (ACPC) of Gujarat. Eligibility and process:</text:p>
      <text:p text:style-name="P7">• Qualification: 10+2 with Physics, Chemistry, and Mathematics with minimum 45% marks</text:p>
      <text:p text:style-name="P7">• Entrance Exam: GUJCET (Gujarat Common Entrance Test) or JEE Main scores</text:p>
      <text:p text:style-name="P7">• Counseling: Centralized online counseling by ACPC</text:p>
      <text:p text:style-name="P6">• Lateral Entry: Available for diploma holders and B.Sc. graduates</text:p>
      <text:h text:style-name="Heading_20_2" text:outline-level="2">M.Tech Admission</text:h>
      <text:p text:style-name="P6">Admission to M.Tech programs requires:</text:p>
      <text:p text:style-name="P7">• B.E./B.Tech degree with minimum 45% marks in relevant discipline</text:p>
      <text:p text:style-name="P7">• Valid GATE score or Gujarat PGCET examination</text:p>
      <text:p text:style-name="P6">• ACPC counseling for seat allotment</text:p>
      <text:h text:style-name="Heading_20_2" text:outline-level="2">Ph.D. Admission</text:h>
      <text:p text:style-name="P6">Doctoral program admission through:</text:p>
      <text:p text:style-name="P7">• M.E./M.Tech with minimum required percentage</text:p>
      <text:p text:style-name="P7">• UGC NET/GATE qualification preferred</text:p>
      <text:p text:style-name="P6">• Research proposal and interview</text:p>
      <text:h text:style-name="Heading_20_2" text:outline-level="2">Fee Structure</text:h>
      <text:p text:style-name="P6">BVM offers different fee structures for various categories:</text:p>
      <text:p text:style-name="P7"><text:span text:style-name="T2">Government Quota: </text:span>INR 64,500 per year (B.Tech)</text:p>
      <text:p text:style-name="P7"><text:span text:style-name="T2">Management Quota: </text:span>INR 1,43,000 per year</text:p>
      <text:p text:style-name="P7"><text:span text:style-name="T2">NRI Students: </text:span>$2,250 to $4,000 per year</text:p>
      <text:p text:style-name="P6">Total B.Tech fees typically range from INR 2.92 lakhs to 5.76 lakhs for the complete program</text:p>
      <text:h text:style-name="Heading_20_2" text:outline-level="2">Reservation Policy</text:h>
      <text:p text:style-name="P7">• 27% seats reserved for economically weaker sections (unreserved category)</text:p>
      <text:p text:style-name="P7"><text:soft-page-break/>• 15% seats reserved for Scheduled Tribes</text:p>
      <text:p text:style-name="P6">• Other reservations as per Gujarat government policy</text:p>
      <text:p text:style-name="Standard"/>
      <text:h text:style-name="P10" text:outline-level="1">Location and Contact Information</text:h>
      <text:h text:style-name="Heading_20_2" text:outline-level="2">Campus Location</text:h>
      <text:p text:style-name="P7">Birla Vishvakarma Mahavidyalaya Engineering College</text:p>
      <text:p text:style-name="P7">Post Box No. 20</text:p>
      <text:p text:style-name="P7">Near Shastri Ground</text:p>
      <text:p text:style-name="P7">Vallabh Vidyanagar</text:p>
      <text:p text:style-name="P7">Anand - 388120</text:p>
      <text:p text:style-name="P6">Gujarat, India</text:p>
      <text:h text:style-name="Heading_20_2" text:outline-level="2">Accessibility</text:h>
      <text:p text:style-name="P7"><text:span text:style-name="T2">Nearest Railway Station: </text:span>Anand Junction (5.8 km)</text:p>
      <text:p text:style-name="P7"><text:span text:style-name="T2">Nearest Bus Stop: </text:span>Nana Bazaar Bus Stop (1 km)</text:p>
      <text:p text:style-name="P7"><text:span text:style-name="T2">Major Cities: </text:span>Ahmedabad (90 km), Vadodara (40 km)</text:p>
      <text:p text:style-name="P6"><text:span text:style-name="T2">Airport: </text:span>Vadodara Airport (40 km), Ahmedabad Airport (100 km)</text:p>
      <text:h text:style-name="Heading_20_2" text:outline-level="2">Contact Details</text:h>
      <text:p text:style-name="P7"><text:span text:style-name="T2">Phone: </text:span>02692-230-104</text:p>
      <text:p text:style-name="P7"><text:span text:style-name="T2">Email: </text:span>principal@bvmengineering.ac.in</text:p>
      <text:p text:style-name="P6"><text:span text:style-name="T2">Website: </text:span>www.bvmengineering.ac.in</text:p>
      <text:h text:style-name="Heading_20_2" text:outline-level="2">Coordinates</text:h>
      <text:p text:style-name="P6">22°33'8" N, 72°55'25" E</text:p>
      <text:p text:style-name="Standard"/>
      <text:h text:style-name="P10" text:outline-level="1">Future Directions and Conclusion</text:h>
      <text:h text:style-name="Heading_20_2" text:outline-level="2">Strategic Vision for the Future</text:h>
      <text:p text:style-name="P6">Under the leadership of Prof. (Dr.) Vinay J. Patel, BVM is embarking on a transformative journey to become a regional innovation hub and global talent powerhouse. The strategic vision encompasses:</text:p>
      <text:p text:style-name="P7"><text:span text:style-name="T2">Research Ecosystem Development: </text:span>Building a robust culture where faculty and students engage in cutting-edge research from undergraduate level onwards</text:p>
      <text:p text:style-name="P7"><text:span text:style-name="T2">Industry-Academia Integration: </text:span>Strengthening partnerships with leading companies for live projects, internships, and collaborative research</text:p>
      <text:p text:style-name="P7"><text:span text:style-name="T2">Infrastructure Enhancement: </text:span>Continuous investment in state-of-the-art laboratories, computing resources, and R&amp;D facilities</text:p>
      <text:p text:style-name="P7"><text:span text:style-name="T2">Global Collaborations: </text:span>Expanding international partnerships for student and faculty exchange, joint research, and dual degree programs</text:p>
      <text:p text:style-name="P6"><text:span text:style-name="T2">Entrepreneurship Promotion: </text:span>Fostering startup culture through incubation centers, mentorship, and funding support</text:p>
      <text:h text:style-name="Heading_20_2" text:outline-level="2">Alignment with National Goals</text:h>
      <text:p text:style-name="P6">BVM is actively aligning its programs with national initiatives:</text:p>
      <text:p text:style-name="P7">• NEP 2020 implementation through flexible curriculum and multidisciplinary learning</text:p>
      <text:p text:style-name="P7">• Skill India and Make in India through practical training and industry collaborations</text:p>
      <text:p text:style-name="P7">• Digital India through emphasis on emerging technologies like AI, ML, and IoT</text:p>
      <text:p text:style-name="P6">• Sustainable Development Goals through green campus initiatives and research on renewable energy</text:p>
      <text:h text:style-name="Heading_20_2" text:outline-level="2">Continuing the Legacy</text:h>
      <text:p text:style-name="P6">As BVM moves forward, it remains committed to the foundational values established by Sardar Patel and the Birla family. The institution continues to honor its motto "Work is Worship" while adapting to contemporary educational needs. With 75+ years of excellence, over 20,000 successful alumni, and a track record of producing industry leaders like A.M. Naik, BVM stands poised to contribute significantly to India's technological advancement and global competitiveness.</text:p>
      <text:p text:style-name="P6">The college's journey from being Gujarat's first engineering college in 1948 to becoming an autonomous institution with NBA and NAAC accreditations demonstrates sustained commitment to quality education. As it embraces the challenges and opportunities of the 21st century, BVM remains dedicated to nurturing engineers who are not only technically proficient but also socially responsible, ethically grounded, and globally <text:soft-page-break/>competent.</text:p>
      <text:p text:style-name="P6">Through continuous innovation in pedagogy, robust research infrastructure, strong industry partnerships, and comprehensive student development programs, BVM Engineering College is well-positioned to shape the next generation of engineering leaders who will drive India's progress in science, technology, and innovation.</text:p>
      <text:p text:style-name="P9"><text:span text:style-name="T4">* * *</text:span></text:p>
      <text:p text:style-name="P3"><text:span text:style-name="T9">For more information, visit: www.bvmengineering.ac.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docs-Roboto" svg:font-family="docs-Roboto, Helvetica, Arial, sans-serif"/>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2"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Title" style:family="paragraph" style:parent-style-name="Heading" style:next-style-name="Subtitle" style:default-outline-level="" style:list-style-name=""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 style:class="text">
      <style:paragraph-properties fo:margin-top="0.25in" fo:margin-bottom="0.1665in"/>
      <style:text-properties fo:color="#2e75b6" style:font-name="Arial1" fo:font-size="16pt" fo:font-weight="bold" style:font-name-asian="Arial2" style:font-size-asian="16pt" style:font-weight-asian="bold" style:font-name-complex="Arial2"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1945in" fo:margin-bottom="0.1252in"/>
      <style:text-properties fo:color="#2e75b6" style:font-name="Arial1" fo:font-size="14pt" fo:font-weight="bold" style:font-name-asian="Arial2" style:font-size-asian="14pt" style:font-weight-asian="bold" style:font-name-complex="Arial2"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1665in" fo:margin-bottom="0.0972in"/>
      <style:text-properties fo:color="#2e75b6" style:font-name="Arial1" fo:font-size="13pt" fo:font-weight="bold" style:font-name-asian="Arial2" style:font-size-asian="13pt" style:font-weight-asian="bold" style:font-name-complex="Arial2" style:font-size-complex="13pt" style:font-weight-complex="bold"/>
    </style:style>
    <style:style style:name="Heading_20_4" style:display-name="Heading 4" style:family="paragraph" style:parent-style-name="Heading" style:next-style-name="Text_20_body" style:default-outline-level="4" style:list-style-name="" style:class="text">
      <style:text-properties fo:color="#2e74b5" fo:font-style="italic" style:font-style-asian="italic" style:font-style-complex="italic"/>
    </style:style>
    <style:style style:name="Heading_20_5" style:display-name="Heading 5" style:family="paragraph" style:parent-style-name="Heading" style:next-style-name="Text_20_body" style:default-outline-level="5" style:list-style-name="" style:class="text">
      <style:text-properties fo:color="#2e74b5"/>
    </style:style>
    <style:style style:name="Heading_20_6" style:display-name="Heading 6" style:family="paragraph" style:parent-style-name="Heading" style:next-style-name="Text_20_body" style:default-outline-level="6" style:list-style-name="" style:class="text">
      <style:text-properties fo:color="#1f4d78"/>
    </style:style>
    <style:style style:name="Strong_20_Emphasis" style:display-name="Strong Emphasis" style:family="paragraph" style:default-outline-level="" style:list-style-name="">
      <style:text-properties fo:font-weight="bold" style:font-weight-asian="bold" style:font-weight-complex="bold"/>
    </style:style>
    <style:style style:name="List_20_Paragraph" style:display-name="List Paragraph" style:family="paragraph" style:default-outline-level="" style:list-style-name=""/>
    <style:style style:name="footnote_20_text" style:display-name="footnote text" style:family="paragraph" style:default-outline-level="" style:list-style-name="">
      <style:paragraph-properties fo:margin-top="0in" fo:margin-bottom="0in" fo:line-height="100%"/>
      <style:text-properties fo:font-size="10pt" style:font-size-asian="10pt" style:font-size-complex="10pt"/>
    </style:style>
    <style:style style:name="Internet_20_link" style:display-name="Internet link" style:family="text">
      <style:text-properties fo:color="#0563c1"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Footnote_20_Text_20_Char" style:display-name="Footnote Text Char" style:family="text">
      <style:text-propertie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n-named</meta:initial-creator>
    <dc:creator>Kumar Abhinav</dc:creator>
    <meta:editing-cycles>1</meta:editing-cycles>
    <meta:creation-date>2026-02-14T00:41:37.300</meta:creation-date>
    <dc:date>2026-02-14T12:58:49.39</dc:date>
    <meta:document-statistic meta:table-count="2" meta:image-count="0" meta:object-count="0" meta:page-count="33" meta:paragraph-count="463" meta:word-count="5722" meta:character-count="43526"/>
    <meta:generator>OpenOffice/4.1.15$Win32 OpenOffice.org_project/4115m2$Build-9813</meta:generator>
  </office:meta>
</office:document-meta>
</file>